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style:text-properties style:font-name="Times New Roman" fo:font-size="12pt" officeooo:rsid="0003b577" officeooo:paragraph-rsid="0003b577" style:font-size-asian="10.5pt" style:font-size-complex="12pt"/>
    </style:style>
    <style:style style:name="P2" style:family="paragraph" style:parent-style-name="Standard">
      <style:paragraph-properties fo:line-height="150%" fo:text-align="justify" style:justify-single-word="false"/>
      <style:text-properties style:font-name="Times New Roman" fo:font-size="12pt" officeooo:rsid="00086cc6" officeooo:paragraph-rsid="00086cc6" style:font-size-asian="10.5pt" style:font-size-complex="12pt"/>
    </style:style>
    <style:style style:name="P3" style:family="paragraph" style:parent-style-name="Standard">
      <style:paragraph-properties fo:line-height="150%" fo:text-align="justify" style:justify-single-word="false"/>
      <style:text-properties style:font-name="Times New Roman" fo:font-size="12pt" officeooo:rsid="00086cc6" officeooo:paragraph-rsid="00090fb9" style:font-size-asian="10.5pt" style:font-size-complex="12pt"/>
    </style:style>
    <style:style style:name="T1" style:family="text">
      <style:text-properties officeooo:rsid="00086cc6"/>
    </style:style>
    <style:style style:name="T2" style:family="text">
      <style:text-properties officeooo:rsid="0008903b"/>
    </style:style>
    <style:style style:name="T3" style:family="text">
      <style:text-properties officeooo:rsid="00090fb9"/>
    </style:style>
    <style:style style:name="T4" style:family="text">
      <style:text-properties fo:color="#000000" loext:opacity="100%"/>
    </style:style>
    <style:style style:name="T5" style:family="text">
      <style:text-properties fo:color="#000000" loext:opacity="100%" officeooo:rsid="000890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history of african american music</text:p>
      <text:p text:style-name="P1"><text:tab/><text:span text:style-name="T1">a. <text:s/></text:span><text:span text:style-name="T2">their use</text:span></text:p>
      <text:p text:style-name="P3">The age of slavery, which lasted from the seventeenth to the nineteenth century, was the time period during which the first African American labour songs were composed. The fact that they were part of a society that was almost exclusively oral meant that they did not have a set form, and the practice of recording them did not start until after the age of slavery had ended in 1865. The majority of agricultural work songs were rhythmic a cappella songs that were intended to increase productivity while also reducing feelings of boredom. Akin to the beats of African drums, the rhythms of work songs used to synchronize the physical movement of groups of people and coordinate activities like planting, hoeing, and harvesting. Work songs frequently had improvised lines that were performed in a manner that was unique to each performance. This allowed vocalists to engage in a subversive form of expression. Slaves would sing improvised lyrics in order to make fun of their masters, vent their frustrations, and talk about their hopes of escape. A great number of work songs served, moreover, to develop connections and familiarity among workers. African Americans maintained their long-standing tradition of singing work songs far into the 20th century. Before the availability of sophisticated technology in the 1960s, for instance, black railroad construction workers in the southern United States frequently sang them. This was before the advent of modern machinery. Songs and chants were utilized as tools by crews to assist in the completion of certain duties and to communicate coded signals to one other in a way that would not be understood by the foreman or other individuals. In addition to directing the work that needed to be done, the goal was to boost the morale of the workforce on both a physical and an emotional level.</text:p>
      <text:p text:style-name="P3"><text:tab/><text:span text:style-name="T3">b. how they were structured</text:span></text:p>
      <text:p text:style-name="P3"><text:span text:style-name="T4">The use of a call and response structure, in which one person would sing a stanza or verses and the rest would react with a chorus, was a characteristic that was typical of African American work songs. This structure originated in the African traditions of agricultural labour songs, made its way into the spirituals that emerged after Africans held in slavery began to convert to Christianity, and eventually found its way into both gospel music and blues music as a result of this progression. The use of a call-and-response structure highlights the role that work songs play in fostering conversation. The significance of conversation is highlighted throughout a wide variety of African American cultures (such as rap and the blues), and this tradition lives on up to the current day. According to the scholar Tilford Brooks, "improvisation is utilized extensively in Black folk songs, and it is an essential element especially in songs that employ the call-and-response pattern." Brooks </text:span><text:soft-page-break/><text:span text:style-name="T4">also notes that frequently in a work song, "the leader has license to improvise on the melody in [their] call," while "the response usually repeats its basic melody line without change." Also present were field hollers, shouts, and moans, which may have been initially designed </text:span><text:span text:style-name="T5">for different groups or individuals to locate each other</text:span><text:span text:style-name="T4">. </text:span><text:span text:style-name="T5">African American slaves</text:span><text:span text:style-name="T4"> found creative ways to </text:span><text:span text:style-name="T5">create</text:span><text:span text:style-name="T4"> percussion </text:span><text:span text:style-name="T5">by using their own bodies or other devices</text:span><text:span text:style-name="T4"> after drums were outlawed in the eighteenth century. <text:s/></text:span>( <text:a xlink:type="simple" xlink:href="https://www.jazzhistorytree.com/work-field-songs/" text:style-name="Internet_20_link" text:visited-style-name="Visited_20_Internet_20_Link">https://www.jazzhistorytree.com/work-field-songs/</text:a> ) </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31T15:38:16.124499652</meta:creation-date>
    <dc:date>2022-11-01T17:52:56.472730076</dc:date>
    <meta:editing-duration>PT26M44S</meta:editing-duration>
    <meta:editing-cycles>3</meta:editing-cycles>
    <meta:generator>LibreOffice/7.3.6.2$Linux_X86_64 LibreOffice_project/30$Build-2</meta:generator>
    <meta:document-statistic meta:table-count="0" meta:image-count="0" meta:object-count="0" meta:page-count="2" meta:paragraph-count="5" meta:word-count="558" meta:character-count="3460" meta:non-whitespace-character-count="2902"/>
  </office:meta>
</office:document-meta>
</file>